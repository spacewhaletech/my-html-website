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style:font-face style:name="Playfair Display" svg:font-family="'Playfair Display', Georgia, serif"/>
    <style:font-face style:name="unset" svg:font-family="unset"/>
  </office:font-face-decls>
  <office:automatic-styles>
    <style:style style:name="P1" style:family="paragraph" style:parent-style-name="Heading_20_2">
      <style:text-properties fo:font-variant="normal" fo:text-transform="none" fo:color="#8a969c" loext:opacity="100%" style:font-name="unset" fo:font-size="22.5pt" fo:letter-spacing="normal" fo:font-style="normal" fo:font-weight="normal"/>
    </style:style>
    <style:style style:name="P2" style:family="paragraph" style:parent-style-name="Heading_20_4">
      <style:paragraph-properties fo:margin-left="0in" fo:margin-right="0in" fo:margin-top="0in" fo:margin-bottom="0.25in" style:contextual-spacing="false" fo:line-height="125%" fo:text-align="center" style:justify-single-word="false" fo:text-indent="0in" style:auto-text-indent="false"/>
      <style:text-properties fo:color="#1b1b1b" loext:opacity="100%" style:font-name="Open Sans" fo:font-size="16.5pt" fo:letter-spacing="normal" fo:font-weight="normal"/>
    </style:style>
    <style:style style:name="P3" style:family="paragraph" style:parent-style-name="Heading_20_4">
      <style:paragraph-properties fo:margin-left="0in" fo:margin-right="0in" fo:margin-top="0in" fo:margin-bottom="0.25in" style:contextual-spacing="false" fo:line-height="125%" fo:text-align="center" style:justify-single-word="false" fo:text-indent="0in" style:auto-text-indent="false"/>
      <style:text-properties fo:font-variant="normal" fo:text-transform="none" fo:color="#000000" loext:opacity="100%"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4"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font-variant="normal" fo:text-transform="none" fo:color="#5e5e5e" loext:opacity="100%" style:font-name="Open Sans" fo:font-size="12pt" fo:letter-spacing="normal" fo:font-style="normal" fo:font-weight="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Our Services</text:h>
      <text:section text:style-name="Sect1" text:name="6106f452-e9a1-4032-991d-f177b00299c1">
        <text:h text:style-name="P2" text:outline-level="4">Personalized Analytics</text:h>
        <text:p text:style-name="P4">We take raw data from our clients and turn it into a meaningful results. We work with our users throughout the process to ensure that the analysis is relevant. We are committed to providing clean, in-depth datasets.</text:p>
      </text:section>
      <text:section text:style-name="Sect1" text:name="0fa9a715-ede9-4c89-b2f5-d61264171266">
        <text:h text:style-name="P3" text:outline-level="4">Rigorous Testing</text:h>
        <text:p text:style-name="P4">Once we finish our initial analysis, we perform multiple quality checks. These tests are included in the price of the analysis package. After testing, we deliver the results to our client along with a certification of the process.</text:p>
      </text:section>
      <text:section text:style-name="Sect1" text:name="c5ac3417-8c76-4ec8-b4cc-fa869815abf3">
        <text:h text:style-name="P3" text:outline-level="4">Quality Guaranteed</text:h>
        <text:p text:style-name="P4">Our goal is to provide clients high-quality visual analytics. No matter the discipline or type of data, we pride ourselves on providing professional results. We guarantee you will be satisfied with our work.</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style:font-face style:name="Playfair Display" svg:font-family="'Playfair Display', Georgia, serif"/>
    <style:font-face style:name="unset" svg:font-family="unse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2T13:31:01.093622371</meta:creation-date>
    <dc:date>2026-07-12T13:32:49.130206028</dc:date>
    <meta:editing-duration>PT1M49S</meta:editing-duration>
    <meta:editing-cycles>1</meta:editing-cycles>
    <meta:document-statistic meta:table-count="0" meta:image-count="0" meta:object-count="0" meta:page-count="1" meta:paragraph-count="7" meta:word-count="116" meta:character-count="720" meta:non-whitespace-character-count="611"/>
    <meta:generator>LibreOffice/24.2.7.2$Linux_X86_64 LibreOffice_project/420$Build-2</meta:generator>
  </office:meta>
</office:document-meta>
</file>